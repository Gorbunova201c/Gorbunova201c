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automatic-styles>
    <style:style style:name="co1" style:family="table-column">
      <style:table-column-properties fo:break-before="auto" style:column-width="5.35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5.463cm"/>
    </style:style>
    <style:style style:name="co4" style:family="table-column">
      <style:table-column-properties fo:break-before="auto" style:column-width="5.406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535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2.95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ta5" style:family="table" style:master-page-name="PageStyle_5f_Лист5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[.A2]+1)-1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[.A3]+1)-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[.A4]+1)-1"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[.A5]+1)-1" office:value-type="float" office:value="15" calcext:value-type="float">
            <text:p>15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[.A6]+1)-1" office:value-type="float" office:value="31" calcext:value-type="float">
            <text:p>31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[.A7]+1)-1" office:value-type="float" office:value="63" calcext:value-type="float">
            <text:p>6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8]+1)-1" office:value-type="float" office:value="127" calcext:value-type="float">
            <text:p>127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[.A9]+1)-1" office:value-type="float" office:value="255" calcext:value-type="float">
            <text:p>255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[.A10]+1)-1" office:value-type="float" office:value="511" calcext:value-type="float">
            <text:p>511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[.A11]+1)-1" office:value-type="float" office:value="1023" calcext:value-type="float">
            <text:p>1023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[.A12]+1)-1" office:value-type="float" office:value="2047" calcext:value-type="float">
            <text:p>2047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[.A13]+1)-1" office:value-type="float" office:value="4095" calcext:value-type="float">
            <text:p>4095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[.A14]+1)-1" office:value-type="float" office:value="8191" calcext:value-type="float">
            <text:p>8191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[.A15]+1)-1" office:value-type="float" office:value="16383" calcext:value-type="float">
            <text:p>16383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[.A16]+1)-1" office:value-type="float" office:value="32767" calcext:value-type="float">
            <text:p>32767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[.A17]+1)-1" office:value-type="float" office:value="65535" calcext:value-type="float">
            <text:p>65535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[.A18]+1)-1" office:value-type="float" office:value="131071" calcext:value-type="float">
            <text:p>131071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[.A19]+1)-1" office:value-type="float" office:value="262143" calcext:value-type="float">
            <text:p>262143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[.A20]+1)-1" office:value-type="float" office:value="524287" calcext:value-type="float">
            <text:p>524287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21]+1)-1" office:value-type="float" office:value="1048575" calcext:value-type="float">
            <text:p>1048575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[.A22]+1)-1" office:value-type="float" office:value="2097151" calcext:value-type="float">
            <text:p>2097151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[.A23]+1)-1" office:value-type="float" office:value="4194303" calcext:value-type="float">
            <text:p>4194303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[.A24]+1)-1" office:value-type="float" office:value="8388607" calcext:value-type="float">
            <text:p>8388607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[.A25]+1)-1" office:value-type="float" office:value="16777215" calcext:value-type="float">
            <text:p>16777215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3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<text:s/>Максимальный показатель</text:p>
          </table:table-cell>
          <table:table-cell table:style-name="ce1" office:value-type="string" calcext:value-type="string">
            <text:p>Сумма</text:p>
          </table:table-cell>
          <table:table-cell table:number-columns-repeated="1638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3^([.A2]+1)-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3^([.A3]+1)-1"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3^([.A4]+1)-1" office:value-type="float" office:value="26" calcext:value-type="float">
            <text:p>26</text:p>
          </table:table-cell>
          <table:table-cell table:number-columns-repeated="1638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3^([.A5]+1)-1"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3^([.A6]+1)-1" office:value-type="float" office:value="242" calcext:value-type="float">
            <text:p>242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3^([.A7]+1)-1" office:value-type="float" office:value="728" calcext:value-type="float">
            <text:p>728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3^([.A8]+1)-1" office:value-type="float" office:value="2186" calcext:value-type="float">
            <text:p>2186</text:p>
          </table:table-cell>
          <table:table-cell table:number-columns-repeated="163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3^([.A9]+1)-1" office:value-type="float" office:value="6560" calcext:value-type="float">
            <text:p>6560</text:p>
          </table:table-cell>
          <table:table-cell table:number-columns-repeated="1638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3^([.A10]+1)-1" office:value-type="float" office:value="19682" calcext:value-type="float">
            <text:p>19682</text:p>
          </table:table-cell>
          <table:table-cell table:number-columns-repeated="1638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3^([.A11]+1)-1" office:value-type="float" office:value="59048" calcext:value-type="float">
            <text:p>59048</text:p>
          </table:table-cell>
          <table:table-cell table:number-columns-repeated="1638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3^([.A12]+1)-1" office:value-type="float" office:value="177146" calcext:value-type="float">
            <text:p>177146</text:p>
          </table:table-cell>
          <table:table-cell table:number-columns-repeated="1638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3^([.A13]+1)-1" office:value-type="float" office:value="531440" calcext:value-type="float">
            <text:p>531440</text:p>
          </table:table-cell>
          <table:table-cell table:number-columns-repeated="1638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3^([.A14]+1)-1" office:value-type="float" office:value="1594322" calcext:value-type="float">
            <text:p>1594322</text:p>
          </table:table-cell>
          <table:table-cell table:number-columns-repeated="1638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3^([.A15]+1)-1" office:value-type="float" office:value="4782968" calcext:value-type="float">
            <text:p>4782968</text:p>
          </table:table-cell>
          <table:table-cell table:number-columns-repeated="1638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3^([.A16]+1)-1" office:value-type="float" office:value="14348906" calcext:value-type="float">
            <text:p>14348906</text:p>
          </table:table-cell>
          <table:table-cell table:number-columns-repeated="1638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3^([.A17]+1)-1" office:value-type="float" office:value="43046720" calcext:value-type="float">
            <text:p>43046720</text:p>
          </table:table-cell>
          <table:table-cell table:number-columns-repeated="1638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3^([.A18]+1)-1" office:value-type="float" office:value="129140162" calcext:value-type="float">
            <text:p>129140162</text:p>
          </table:table-cell>
          <table:table-cell table:number-columns-repeated="1638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3^([.A19]+1)-1" office:value-type="float" office:value="387420488" calcext:value-type="float">
            <text:p>387420488</text:p>
          </table:table-cell>
          <table:table-cell table:number-columns-repeated="1638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3^([.A20]+1)-1" office:value-type="float" office:value="1162261466" calcext:value-type="float">
            <text:p>1162261466</text:p>
          </table:table-cell>
          <table:table-cell table:number-columns-repeated="1638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3^([.A21]+1)-1" office:value-type="float" office:value="3486784400" calcext:value-type="float">
            <text:p>3486784400</text:p>
          </table:table-cell>
          <table:table-cell table:number-columns-repeated="1638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3^([.A22]+1)-1" office:value-type="float" office:value="10460353202" calcext:value-type="float">
            <text:p>10460353202</text:p>
          </table:table-cell>
          <table:table-cell table:number-columns-repeated="1638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3^([.A23]+1)-1" office:value-type="float" office:value="31381059608" calcext:value-type="float">
            <text:p>31381059608</text:p>
          </table:table-cell>
          <table:table-cell table:number-columns-repeated="1638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3^([.A24]+1)-1" office:value-type="float" office:value="94143178826" calcext:value-type="float">
            <text:p>94143178826</text:p>
          </table:table-cell>
          <table:table-cell table:number-columns-repeated="1638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3^([.A25]+1)-1" office:value-type="float" office:value="282429536480" calcext:value-type="float">
            <text:p>282429536480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Максимальный показатель</text:p>
          </table:table-cell>
          <table:table-cell table:style-name="ce1" office:value-type="string" calcext:value-type="string">
            <text:p>Сумма для 2</text:p>
          </table:table-cell>
          <table:table-cell table:style-name="ce1" office:value-type="string" calcext:value-type="string">
            <text:p>Сумма для 3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VLOOKUP([.A2]; [$Лист1.A1:.B25]; 2; )" office:value-type="float" office:value="1" calcext:value-type="float">
            <text:p>1</text:p>
          </table:table-cell>
          <table:table-cell table:style-name="ce1" table:formula="of:=VLOOKUP([.A2]; [$Лист2.A1:.B25]; 2; 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VLOOKUP([.A3]; [$Лист1.A2:.B26]; 2; )" office:value-type="float" office:value="3" calcext:value-type="float">
            <text:p>3</text:p>
          </table:table-cell>
          <table:table-cell table:style-name="ce1" table:formula="of:=VLOOKUP([.A3]; [$Лист2.A2:.B26]; 2; )"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VLOOKUP([.A4]; [$Лист1.A3:.B27]; 2; )" office:value-type="float" office:value="7" calcext:value-type="float">
            <text:p>7</text:p>
          </table:table-cell>
          <table:table-cell table:style-name="ce1" table:formula="of:=VLOOKUP([.A4]; [$Лист2.A3:.B27]; 2; )"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VLOOKUP([.A5]; [$Лист1.A4:.B28]; 2; )" office:value-type="float" office:value="15" calcext:value-type="float">
            <text:p>15</text:p>
          </table:table-cell>
          <table:table-cell table:style-name="ce1" table:formula="of:=VLOOKUP([.A5]; [$Лист2.A4:.B28]; 2; )"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VLOOKUP([.A6]; [$Лист1.A5:.B29]; 2; )" office:value-type="float" office:value="31" calcext:value-type="float">
            <text:p>31</text:p>
          </table:table-cell>
          <table:table-cell table:style-name="ce1" table:formula="of:=VLOOKUP([.A6]; [$Лист2.A5:.B29]; 2; )" office:value-type="float" office:value="242" calcext:value-type="float">
            <text:p>242</text:p>
          </table:table-cell>
          <table:table-cell table:number-columns-repeated="163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VLOOKUP([.A7]; [$Лист1.A6:.B30]; 2; )" office:value-type="float" office:value="63" calcext:value-type="float">
            <text:p>63</text:p>
          </table:table-cell>
          <table:table-cell table:style-name="ce1" table:formula="of:=VLOOKUP([.A7]; [$Лист2.A6:.B30]; 2; )" office:value-type="float" office:value="728" calcext:value-type="float">
            <text:p>728</text:p>
          </table:table-cell>
          <table:table-cell table:number-columns-repeated="1638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VLOOKUP([.A8]; [$Лист1.A7:.B31]; 2; )" office:value-type="float" office:value="127" calcext:value-type="float">
            <text:p>127</text:p>
          </table:table-cell>
          <table:table-cell table:style-name="ce1" table:formula="of:=VLOOKUP([.A8]; [$Лист2.A7:.B31]; 2; )" office:value-type="float" office:value="2186" calcext:value-type="float">
            <text:p>2186</text:p>
          </table:table-cell>
          <table:table-cell table:number-columns-repeated="1638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VLOOKUP([.A9]; [$Лист1.A8:.B32]; 2; )" office:value-type="float" office:value="255" calcext:value-type="float">
            <text:p>255</text:p>
          </table:table-cell>
          <table:table-cell table:style-name="ce1" table:formula="of:=VLOOKUP([.A9]; [$Лист2.A8:.B32]; 2; )" office:value-type="float" office:value="6560" calcext:value-type="float">
            <text:p>6560</text:p>
          </table:table-cell>
          <table:table-cell table:number-columns-repeated="1638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VLOOKUP([.A10]; [$Лист1.A9:.B33]; 2; )" office:value-type="float" office:value="511" calcext:value-type="float">
            <text:p>511</text:p>
          </table:table-cell>
          <table:table-cell table:style-name="ce1" table:formula="of:=VLOOKUP([.A10]; [$Лист2.A9:.B33]; 2; )" office:value-type="float" office:value="19682" calcext:value-type="float">
            <text:p>19682</text:p>
          </table:table-cell>
          <table:table-cell table:number-columns-repeated="1638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VLOOKUP([.A11]; [$Лист1.A10:.B34]; 2; )" office:value-type="float" office:value="1023" calcext:value-type="float">
            <text:p>1023</text:p>
          </table:table-cell>
          <table:table-cell table:style-name="ce1" table:formula="of:=VLOOKUP([.A11]; [$Лист2.A10:.B34]; 2; )" office:value-type="float" office:value="59048" calcext:value-type="float">
            <text:p>59048</text:p>
          </table:table-cell>
          <table:table-cell table:number-columns-repeated="1638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VLOOKUP([.A12]; [$Лист1.A11:.B35]; 2; )" office:value-type="float" office:value="2047" calcext:value-type="float">
            <text:p>2047</text:p>
          </table:table-cell>
          <table:table-cell table:style-name="ce1" table:formula="of:=VLOOKUP([.A12]; [$Лист2.A11:.B35]; 2; )" office:value-type="float" office:value="177146" calcext:value-type="float">
            <text:p>177146</text:p>
          </table:table-cell>
          <table:table-cell table:number-columns-repeated="163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VLOOKUP([.A13]; [$Лист1.A12:.B36]; 2; )" office:value-type="float" office:value="4095" calcext:value-type="float">
            <text:p>4095</text:p>
          </table:table-cell>
          <table:table-cell table:style-name="ce1" table:formula="of:=VLOOKUP([.A13]; [$Лист2.A12:.B36]; 2; )" office:value-type="float" office:value="531440" calcext:value-type="float">
            <text:p>531440</text:p>
          </table:table-cell>
          <table:table-cell table:number-columns-repeated="163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VLOOKUP([.A14]; [$Лист1.A13:.B37]; 2; )" office:value-type="float" office:value="8191" calcext:value-type="float">
            <text:p>8191</text:p>
          </table:table-cell>
          <table:table-cell table:style-name="ce1" table:formula="of:=VLOOKUP([.A14]; [$Лист2.A13:.B37]; 2; )" office:value-type="float" office:value="1594322" calcext:value-type="float">
            <text:p>1594322</text:p>
          </table:table-cell>
          <table:table-cell table:number-columns-repeated="163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VLOOKUP([.A15]; [$Лист1.A14:.B38]; 2; )" office:value-type="float" office:value="16383" calcext:value-type="float">
            <text:p>16383</text:p>
          </table:table-cell>
          <table:table-cell table:style-name="ce1" table:formula="of:=VLOOKUP([.A15]; [$Лист2.A14:.B38]; 2; )" office:value-type="float" office:value="4782968" calcext:value-type="float">
            <text:p>4782968</text:p>
          </table:table-cell>
          <table:table-cell table:number-columns-repeated="163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VLOOKUP([.A16]; [$Лист1.A15:.B39]; 2; )" office:value-type="float" office:value="32767" calcext:value-type="float">
            <text:p>32767</text:p>
          </table:table-cell>
          <table:table-cell table:style-name="ce1" table:formula="of:=VLOOKUP([.A16]; [$Лист2.A15:.B39]; 2; )" office:value-type="float" office:value="14348906" calcext:value-type="float">
            <text:p>14348906</text:p>
          </table:table-cell>
          <table:table-cell table:number-columns-repeated="163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VLOOKUP([.A17]; [$Лист1.A16:.B40]; 2; )" office:value-type="float" office:value="65535" calcext:value-type="float">
            <text:p>65535</text:p>
          </table:table-cell>
          <table:table-cell table:style-name="ce1" table:formula="of:=VLOOKUP([.A17]; [$Лист2.A16:.B40]; 2; )" office:value-type="float" office:value="43046720" calcext:value-type="float">
            <text:p>43046720</text:p>
          </table:table-cell>
          <table:table-cell table:number-columns-repeated="163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VLOOKUP([.A18]; [$Лист1.A17:.B41]; 2; )" office:value-type="float" office:value="131071" calcext:value-type="float">
            <text:p>131071</text:p>
          </table:table-cell>
          <table:table-cell table:style-name="ce1" table:formula="of:=VLOOKUP([.A18]; [$Лист2.A17:.B41]; 2; )" office:value-type="float" office:value="129140162" calcext:value-type="float">
            <text:p>129140162</text:p>
          </table:table-cell>
          <table:table-cell table:number-columns-repeated="163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VLOOKUP([.A19]; [$Лист1.A18:.B42]; 2; )" office:value-type="float" office:value="262143" calcext:value-type="float">
            <text:p>262143</text:p>
          </table:table-cell>
          <table:table-cell table:style-name="ce1" table:formula="of:=VLOOKUP([.A19]; [$Лист2.A18:.B42]; 2; )" office:value-type="float" office:value="387420488" calcext:value-type="float">
            <text:p>387420488</text:p>
          </table:table-cell>
          <table:table-cell table:number-columns-repeated="1638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VLOOKUP([.A20]; [$Лист1.A19:.B43]; 2; )" office:value-type="float" office:value="524287" calcext:value-type="float">
            <text:p>524287</text:p>
          </table:table-cell>
          <table:table-cell table:style-name="ce1" table:formula="of:=VLOOKUP([.A20]; [$Лист2.A19:.B43]; 2; )" office:value-type="float" office:value="1162261466" calcext:value-type="float">
            <text:p>1162261466</text:p>
          </table:table-cell>
          <table:table-cell table:number-columns-repeated="163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VLOOKUP([.A21]; [$Лист1.A20:.B44]; 2; )" office:value-type="float" office:value="1048575" calcext:value-type="float">
            <text:p>1048575</text:p>
          </table:table-cell>
          <table:table-cell table:style-name="ce1" table:formula="of:=VLOOKUP([.A21]; [$Лист2.A20:.B44]; 2; )" office:value-type="float" office:value="3486784400" calcext:value-type="float">
            <text:p>3486784400</text:p>
          </table:table-cell>
          <table:table-cell table:number-columns-repeated="1638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VLOOKUP([.A22]; [$Лист1.A21:.B45]; 2; )" office:value-type="float" office:value="2097151" calcext:value-type="float">
            <text:p>2097151</text:p>
          </table:table-cell>
          <table:table-cell table:style-name="ce1" table:formula="of:=VLOOKUP([.A22]; [$Лист2.A21:.B45]; 2; )" office:value-type="float" office:value="10460353202" calcext:value-type="float">
            <text:p>10460353202</text:p>
          </table:table-cell>
          <table:table-cell table:number-columns-repeated="1638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VLOOKUP([.A23]; [$Лист1.A22:.B46]; 2; )" office:value-type="float" office:value="4194303" calcext:value-type="float">
            <text:p>4194303</text:p>
          </table:table-cell>
          <table:table-cell table:style-name="ce1" table:formula="of:=VLOOKUP([.A23]; [$Лист2.A22:.B46]; 2; )" office:value-type="float" office:value="31381059608" calcext:value-type="float">
            <text:p>31381059608</text:p>
          </table:table-cell>
          <table:table-cell table:number-columns-repeated="1638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VLOOKUP([.A24]; [$Лист1.A23:.B47]; 2; )" office:value-type="float" office:value="8388607" calcext:value-type="float">
            <text:p>8388607</text:p>
          </table:table-cell>
          <table:table-cell table:style-name="ce1" table:formula="of:=VLOOKUP([.A24]; [$Лист2.A23:.B47]; 2; )" office:value-type="float" office:value="94143178826" calcext:value-type="float">
            <text:p>94143178826</text:p>
          </table:table-cell>
          <table:table-cell table:number-columns-repeated="163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VLOOKUP([.A25]; [$Лист1.A24:.B48]; 2; )" office:value-type="float" office:value="16777215" calcext:value-type="float">
            <text:p>16777215</text:p>
          </table:table-cell>
          <table:table-cell table:style-name="ce1" table:formula="of:=VLOOKUP([.A25]; [$Лист2.A24:.B48]; 2; )" office:value-type="float" office:value="282429536480" calcext:value-type="float">
            <text:p>282429536480</text:p>
          </table:table-cell>
          <table:table-cell table:number-columns-repeated="16381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Статистическая функций</text:p>
          </table:table-cell>
          <table:table-cell table:style-name="ce1" office:value-type="string" calcext:value-type="string">
            <text:p>Для A (Лист 3)</text:p>
          </table:table-cell>
          <table:table-cell table:style-name="ce1" office:value-type="string" calcext:value-type="string">
            <text:p>Для B (Лист 3)</text:p>
          </table:table-cell>
          <table:table-cell table:style-name="ce1" office:value-type="string" calcext:value-type="string">
            <text:p>Для C (Лист 3)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Среднее значение</text:p>
          </table:table-cell>
          <table:table-cell table:style-name="ce1" table:formula="of:=AVERAGE([$Лист3.A2:.A25])" office:value-type="float" office:value="11.5" calcext:value-type="float">
            <text:p>11,5</text:p>
          </table:table-cell>
          <table:table-cell table:style-name="ce1" table:formula="of:=AVERAGE([$Лист3.B2:.B25])" office:value-type="float" office:value="1398100.25" calcext:value-type="float">
            <text:p>1398100,25</text:p>
          </table:table-cell>
          <table:table-cell table:style-name="ce1" table:formula="of:=AVERAGE([$Лист3.C2:.C25])" office:value-type="float" office:value="17651846029" calcext:value-type="float">
            <text:p>1765184602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Максимальное значение</text:p>
          </table:table-cell>
          <table:table-cell table:style-name="ce1" table:formula="of:=MAX([$Лист3.A2:.A25])" office:value-type="float" office:value="23" calcext:value-type="float">
            <text:p>23</text:p>
          </table:table-cell>
          <table:table-cell table:style-name="ce1" table:formula="of:=MAX([$Лист3.B2:.B25])" office:value-type="float" office:value="16777215" calcext:value-type="float">
            <text:p>16777215</text:p>
          </table:table-cell>
          <table:table-cell table:style-name="ce1" table:formula="of:=MAX([$Лист3.C2:.C25])" office:value-type="float" office:value="282429536480" calcext:value-type="float">
            <text:p>28242953648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Минимальное значение</text:p>
          </table:table-cell>
          <table:table-cell table:style-name="ce1" table:formula="of:=MIN([$Лист3.A2:.A25])" office:value-type="float" office:value="0" calcext:value-type="float">
            <text:p>0</text:p>
          </table:table-cell>
          <table:table-cell table:style-name="ce1" table:formula="of:=MIN([$Лист3.B2:.B25])" office:value-type="float" office:value="1" calcext:value-type="float">
            <text:p>1</text:p>
          </table:table-cell>
          <table:table-cell table:style-name="ce1" table:formula="of:=MIN([$Лист3.C2:.C25]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Медиана</text:p>
          </table:table-cell>
          <table:table-cell table:style-name="ce1" table:formula="of:=MEDIAN([$Лист3.A2:.A25])" office:value-type="float" office:value="11.5" calcext:value-type="float">
            <text:p>11,5</text:p>
          </table:table-cell>
          <table:table-cell table:style-name="ce1" table:formula="of:=MEDIAN([$Лист3.B2:.B25])" office:value-type="float" office:value="6143" calcext:value-type="float">
            <text:p>6143</text:p>
          </table:table-cell>
          <table:table-cell table:style-name="ce1" table:formula="of:=MEDIAN([$Лист3.C2:.C25])" office:value-type="float" office:value="1062881" calcext:value-type="float">
            <text:p>106288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Мода</text:p>
          </table:table-cell>
          <table:table-cell table:style-name="ce1" table:formula="of:=MODE([$Лист3.A2:.A25])" office:value-type="string" office:string-value="" calcext:value-type="error">
            <text:p>#ЗНАЧ!</text:p>
          </table:table-cell>
          <table:table-cell table:style-name="ce1" table:formula="of:=MODE([$Лист3.B2:.B25])" office:value-type="string" office:string-value="" calcext:value-type="error">
            <text:p>#ЗНАЧ!</text:p>
          </table:table-cell>
          <table:table-cell table:style-name="ce1" table:formula="of:=MODE([$Лист3.C2:.C25])" office:value-type="string" office:string-value="" calcext:value-type="error">
            <text:p>#ЗНАЧ!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Дисперсия</text:p>
          </table:table-cell>
          <table:table-cell table:style-name="ce1" table:formula="of:=VAR([$Лист3.A2:.A25])" office:value-type="float" office:value="50" calcext:value-type="float">
            <text:p>50</text:p>
          </table:table-cell>
          <table:table-cell table:style-name="ce1" table:formula="of:=VAR([$Лист3.B2:.B25])" office:value-type="float" office:value="14277716453108.8" calcext:value-type="float">
            <text:p>14277716453108,8</text:p>
          </table:table-cell>
          <table:table-cell table:style-name="ce1" table:formula="of:=VAR([$Лист3.C2:.C25])" office:value-type="float" office:value="3.57648454013381E+021" calcext:value-type="float">
            <text:p>3,57648454013381E+021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5" table:style-name="ta5">
        <office:forms form:automatic-focus="false" form:apply-design-mode="false"/>
        <table:table-column table:style-name="co2" table:number-columns-repeated="16384" table:default-cell-style-name="Default"/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number-columns-repeated="16382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XO Thames" fo:font-family="'XO Thames'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4cm" fo:page-height="29.718cm"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5" style:display-name="PageStyle_Лист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0:55:53</meta:creation-date>
    <dc:date>2026-05-04T14:01:23.000593331</dc:date>
    <meta:editing-duration>PT53S</meta:editing-duration>
    <meta:generator>LibreOffice/7.6.7.2$Linux_X86_64 LibreOffice_project/60$Build-2</meta:generator>
    <meta:editing-cycles>1</meta:editing-cycles>
    <meta:document-statistic meta:table-count="5" meta:cell-count="204" meta:object-count="0"/>
    <meta:template xlink:type="simple" xlink:actuate="onRequest" xlink:title="Normal.dotm" xlink:href=""/>
  </office:meta>
</office:document-meta>
</file>